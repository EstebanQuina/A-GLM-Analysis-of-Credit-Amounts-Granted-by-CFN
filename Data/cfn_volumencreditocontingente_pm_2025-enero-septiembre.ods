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Hiperv_237_nculo" style:data-style-name="N0">
      <style:table-cell-properties fo:border="thin solid #000000" style:vertical-align="middle" fo:wrap-option="wrap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0.953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96.6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-ranges="Hoja1.A1:Hoja1.B15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Corporación Financiera Nacional B.P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office:annotation draw:style-name="a0" svg:x="1.16666666666667in" svg:y="0.135416666666667in" svg:width="0.885416666666667in" svg:height="0.4791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PM-01-2025-V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office:annotation draw:style-name="a1" svg:x="1.16666666666667in" svg:y="0.260416666666667in" svg:width="0.885416666666667in" svg:height="0.4791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4">
            <text:p>CFN_VolumenCreditoContingente_PM_2025Septiembr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office:annotation draw:style-name="a2" svg:x="1.16666666666667in" svg:y="0.385416666666667in" svg:width="0.885416666666667in" svg:height="0.4791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Serie mensual de volumen de crédito y contingentes por tipo de crédito, destino geográfico y destino económico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">
            <office:annotation draw:style-name="a3" svg:x="1.16666666666667in" svg:y="0.5in" svg:width="0.885416666666667in" svg:height="0.4791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4">
            <text:p>Contiene información <text:s/>trimestral de volumen de crédito y contingentes por tipo de crédito (asumir obligaciones por cuenta de terceros a través de el otorgamiento de garantías, cartas de crédito, etc.) , destino geográfico y destino económico otorgados por la Corporación Financiera Nacional B.P. con corte al mes de agosto de 2025.</text:p>
          </table:table-cell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1">
          <table:table-cell office:value-type="string" table:style-name="ce2">
            <office:annotation draw:style-name="a4" svg:x="1.16666666666667in" svg:y="0.666666666666667in" svg:width="0.885416666666667in" svg:height="0.479166666666667in">
              <dc:creator>JP</dc:creator>
              <text:p><text:span text:style-name="T1">JP:</text:span><text:span text:style-name="T2"/></text:p>
              <text:p><text:span text:style-name="T2">direccion web institucional</text:span></text:p>
            </office:annotation>
            <text:p>Código institución</text:p>
          </table:table-cell>
          <table:table-cell office:value-type="string" table:style-name="ce7">
            <text:p><text:a xlink:href="http://www.cfn.fin.ec/">www.cfn.fin.e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2-11-14T00:00:00" table:style-name="ce4">
            <text:p>2022-11-1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Frecuencia de actualización</text:p>
          </table:table-cell>
          <table:table-cell office:value-type="string" table:style-name="ce4">
            <text:p>trimestr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office:annotation draw:style-name="a5" svg:x="1.16666666666667in" svg:y="1.15625in" svg:width="0.885416666666667in" svg:height="0.479166666666667in">
              <dc:creator>JP</dc:creator>
              <text:p><text:span text:style-name="T1">JP:</text:span><text:span text:style-name="T2"/></text:p>
              <text:p><text:span text:style-name="T2">Fuente u origen de los datos</text:span></text:p>
            </office:annotation>
            <text:p>Archivo maestro</text:p>
          </table:table-cell>
          <table:table-cell office:value-type="string" table:style-name="ce3">
            <text:p>Base de Datos Volumen de Crédito y Contingent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office:annotation draw:style-name="a6" svg:x="1.16666666666667in" svg:y="1.38541666666667in" svg:width="0.885416666666667in" svg:height="0.5in">
              <dc:creator>JP</dc:creator>
              <text:p><text:span text:style-name="T1">JP:</text:span><text:span text:style-name="T2"/></text:p>
              <text:p><text:span text:style-name="T2">correo del funcionario responsable dentro de la institución</text:span></text:p>
            </office:annotation>
            <text:p>Responsable</text:p>
          </table:table-cell>
          <table:table-cell office:value-type="string" table:style-name="ce7">
            <text:p><text:a xlink:href="mailto:jabril@cfn.fin.ec">jabril@cfn.fin.e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office:annotation draw:style-name="a7" svg:x="1.16666666666667in" svg:y="1.53125in" svg:width="0.885416666666667in" svg:height="0.479166666666667in">
              <dc:creator>JP</dc:creator>
              <text:p><text:span text:style-name="T1">JP:</text:span><text:span text:style-name="T2"/></text:p>
              <text:p><text:span text:style-name="T2">Idioma</text:span></text:p>
            </office:annotation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4">
            <text:p>banca pública, crédito, contingen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7">
            <text:p><text:a xlink:href="http://www.cfn.fin.ec/">www.cfn.fin.ec</text:a></text:p>
          </table:table-cell>
          <table:table-cell table:number-columns-repeated="16382" table:style-name="ce1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P</meta:initial-creator>
    <dc:creator>JTOMALA</dc:creator>
    <meta:creation-date>2020-12-02T17:01:11Z</meta:creation-date>
    <dc:date>2025-10-06T14:11:22Z</dc:date>
  </office:meta>
</office:document-meta>
</file>